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5.118cm" style:use-optimal-column-width="false"/>
    </style:style>
    <style:style style:name="co2" style:family="table-column">
      <style:table-column-properties style:column-width="5.762cm" style:use-optimal-column-width="false"/>
    </style:style>
    <style:style style:name="co3" style:family="table-column">
      <style:table-column-properties style:column-width="8.482cm" style:use-optimal-column-width="false"/>
    </style:style>
    <style:style style:name="co4" style:family="table-column">
      <style:table-column-properties style:column-width="7.637cm" style:use-optimal-column-width="false"/>
    </style:style>
    <style:style style:name="ro1" style:family="table-row">
      <style:table-row-properties style:row-height="-10.284cm" style:use-optimal-row-height="false"/>
    </style:style>
    <style:style style:name="ro2" style:family="table-row">
      <style:table-row-properties style:row-height="1.623cm" style:use-optimal-row-height="false"/>
    </style:style>
    <style:style style:name="ro3" style:family="table-row">
      <style:table-row-properties style:row-height="0.91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horizontal-align="center"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 style:text-autospace="none"/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ce4" style:family="table-cell">
      <style:paragraph-properties style:text-autospace="none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text-autospace="none"/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P9" style:family="paragraph">
      <style:paragraph-properties style:text-autospace="none"/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P10" style:family="paragraph">
      <style:paragraph-properties style:text-autospace="none"/>
      <style:text-properties style:font-name="Liberation Sans1" fo:font-size="18pt" style:font-name-asian="Liberation Sans1" style:font-name-complex="Liberation Sans1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0 – Manutenção e Actualizar</text:p>
          </draw:text-box>
        </draw:frame>
        <draw:frame presentation:style-name="pr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>Abrir com BDR</text:p>
              </text:list-item>
              <text:list-item>
                <text:p>Partilha na rede</text:p>
              </text:list-item>
              <text:list-item>
                <text:p>Actualizar</text:p>
              </text:list-item>
              <text:list-item>
                <text:p>Ferramenta de Manuten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2">Tarefa 1 – Marca de água no GFL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Escolha uma pasta e utilize o GFL para introduzir um Contorno com 20% e marca de água de texto em várias imagens (mínimo 4). Exporte para uma nova pasta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2 – Reconhecer caras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Manutenção</text:span> Face engine management &gt; Reset</text:p>
              </text:list-item>
              <text:list-item>
                <text:p text:style-name="P3">Apagar <text:span text:style-name="T2">novas</text:span> Tags de People</text:p>
              </text:list-item>
              <text:list-item>
                <text:p text:style-name="P3">People &gt; Scan for Faces só na pasta Aprender!</text:p>
              </text:list-item>
              <text:list-item>
                <text:p text:style-name="P3">Rever Unknown e <text:span text:style-name="T2">Marcar/tag</text:span></text:p>
              </text:list-item>
              <text:list-item>
                <text:p text:style-name="P3"><text:span text:style-name="T3">People &gt; Scan for Faces </text:span>na pasta Reconhec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3 – Reconhecer <text:span text:style-name="T1">+</text:span> caras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3">Introduzir novas imagens na pasta <text:span text:style-name="T1">reconhecer</text:span> e <text:span text:style-name="T1">aprender</text:span></text:p>
              </text:list-item>
              <text:list-item>
                <text:p text:style-name="P3"><text:span text:style-name="T1">Actualizar</text:span></text:p>
              </text:list-item>
              <text:list-item>
                <text:p text:style-name="P3">People &gt; Scan for Faces só na pasta Aprender!</text:p>
              </text:list-item>
              <text:list-item>
                <text:p text:style-name="P3">Rever Unknown e <text:span text:style-name="T2">Marcar/tag</text:span></text:p>
              </text:list-item>
              <text:list-item>
                <text:p text:style-name="P3"><text:span text:style-name="T3">People &gt; Scan for Faces </text:span>na pasta Reconhec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<text:span text:style-name="T4">Tarefa 4 – </text:span>Auto-<text:span text:style-name="T2">culling</text:span><text:span text:style-name="T5"> com </text:span>Image Quality Scan</text:p>
          </draw:text-box>
        </draw:frame>
        <draw:frame presentation:style-name="pr2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Selecione a pasta Marcos&gt;fotografias</text:p>
              </text:list-item>
              <text:list-item>
                <text:p><text:span text:style-name="T3">Configure: </text:span>All e Aesthetic</text:p>
              </text:list-item>
              <text:list-item>
                <text:p>Filtre para ver as bandeiras verdes e vermelhas</text:p>
              </text:list-item>
              <text:list-item>
                <text:p>Configure para Basic Factor e compare</text:p>
              </text:list-item>
              <text:list-item>
                <text:p>Reconfigure Basic Factors e compar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5 – Auto-<text:span text:style-name="T5">tag</text:span></text:p>
          </draw:text-box>
        </draw:frame>
        <draw:frame presentation:style-name="pr2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imagens_sessão1 &gt; limpar todas as marcas (BDR)</text:p>
              </text:list-item>
              <text:list-item>
                <text:p><text:span text:style-name="T3">Selecione pasta </text:span>imagens_sessão1</text:p>
              </text:list-item>
              <text:list-item>
                <text:p>Configure: <text:span text:style-name="T1">All</text:span>/non-assigned; <text:span text:style-name="T1">Update</text:span>/Replace; Model</text:p>
              </text:list-item>
              <text:list-item>
                <text:p>Acresce línguas (última é a ativa)</text:p>
              </text:list-item>
              <text:list-item>
                <text:p>Experimente diferentes modelos/accuracy (Nano 3 e Nano 7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arefa 6 – Procurar duplicados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3">Procurar Duplicados na pasta imagens_sessao1</text:p>
              </text:list-item>
              <text:list-item>
                <text:p text:style-name="P3">Definir Reference e Configuração</text:p>
              </text:list-item>
              <text:list-item>
                <text:p text:style-name="P3">Update &gt; Procurar &gt; Remover</text:p>
              </text:list-item>
              <text:list-item>
                <text:p text:style-name="P3"><text:span text:style-name="T3">Copiar e colar imagens e </text:span>Procurar &gt; Remo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7 – Descobrir semelhantes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3">Descobrir Semelhante (BDR) na imagem</text:p>
              </text:list-item>
              <text:list-item>
                <text:p text:style-name="P3">Criar nova cópia da imagem e verificar</text:p>
              </text:list-item>
              <text:list-item>
                <text:p text:style-name="P3">Update fingerprints</text:p>
              </text:list-item>
              <text:list-item>
                <text:p text:style-name="P3">Verifica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8 – Desenho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3">Desenhe silhueta da cabeça de um gato</text:p>
              </text:list-item>
              <text:list-item>
                <text:p text:style-name="P3">Aumentar Itens</text:p>
              </text:list-item>
              <text:list-item>
                <text:p text:style-name="P3">Álbuns</text:p>
              </text:list-item>
              <text:list-item>
                <text:p text:style-name="P3">Remover desenh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arefa 9 – Image editor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Selecione uma imagem da pasta Marcos &gt; Fotografias</text:p>
              </text:list-item>
              <text:list-item>
                <text:p>Utilize o Image editor para introduzir alterações com Melhorar &gt; Contraste Local</text:p>
              </text:list-item>
              <text:list-item>
                <text:p><text:span text:style-name="T1">SEMPRE</text:span>: Gravar Como Nova Versão</text:p>
              </text:list-item>
              <text:list-item>
                <text:p>Crie uma nova pasta Processados e mova nova imagem para lá</text:p>
              </text:list-item>
              <text:list-item>
                <text:p>Verifique versõ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arefa 10 – Image editor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Configure para ver barra de miniaturas</text:p>
              </text:list-item>
              <text:list-item>
                <text:p>Selecione 5 imagens para editar</text:p>
              </text:list-item>
              <text:list-item>
                <text:p>Mova novas versões <text:s/>para pasta Processados</text:p>
              </text:list-item>
              <text:list-item>
                <text:p><text:span text:style-name="T1">Melhorar</text:span> &gt; Contraste Local &amp; Nitidez </text:p>
              </text:list-item>
              <text:list-item>
                <text:p><text:span text:style-name="T1">Efeitos</text:span> &gt; Efeitos de Cores &gt; Vivo</text:p>
              </text:list-item>
              <text:list-item>
                <text:p text:style-name="P3"><text:span text:style-name="T1">Cores</text:span> &gt; Brilho, Contraste, Gama &amp; Equ. de Brancos &amp; Ajuste de Níveis</text:p>
                <text:p text:style-name="P3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5" draw:layer="layout" svg:width="25.199cm" svg:height="2.629cm" svg:x="1.4cm" svg:y="0.628cm" presentation:class="title" presentation:user-transformed="true">
          <draw:text-box>
            <text:p><text:span text:style-name="T4">Tarefa 11 – </text:span>Melhorar &gt; G’MIC-Qt</text:p>
          </draw:text-box>
        </draw:frame>
        <draw:frame presentation:style-name="pr2" draw:layer="layout" svg:width="12.297cm" svg:height="11.815cm" svg:x="1.4cm" svg:y="3.685cm" presentation:class="outline" presentation:user-transformed="true">
          <draw:text-box>
            <text:list text:style-name="L2">
              <text:list-item>
                <text:p>Colors</text:p>
                <text:list>
                  <text:list-item>
                    <text:p><text:s/>Auto Balance</text:p>
                  </text:list-item>
                  <text:list-item>
                    <text:p>Basic Adjustments</text:p>
                  </text:list-item>
                  <text:list-item>
                    <text:p>Color Balance</text:p>
                  </text:list-item>
                  <text:list-item>
                    <text:p>Transfer colors</text:p>
                  </text:list-item>
                  <text:list-item>
                    <text:p>Vibrance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4">Repair</text:p>
                <text:list>
                  <text:list-item>
                    <text:p text:style-name="P5"><text:span text:style-name="T6">Anti Alias</text:span></text:p>
                  </text:list-item>
                  <text:list-item>
                    <text:p text:style-name="P5"><text:span text:style-name="T6">Compression Blur</text:span></text:p>
                  </text:list-item>
                </text:list>
              </text:list-item>
              <text:list-item>
                <text:p text:style-name="P4">Details</text:p>
                <text:list>
                  <text:list-item>
                    <text:p text:style-name="P5">Sharpen(s)</text:p>
                  </text:list-item>
                </text:list>
              </text:list-item>
              <text:list-item>
                <text:p text:style-name="P4">Artistic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2"><text:span text:style-name="T4">Tarefa 12 – </text:span>Melhorar &gt; G’MIC-Qt</text:p>
          </draw:text-box>
        </draw:frame>
        <draw:frame presentation:style-name="pr2" draw:layer="layout" svg:width="26.6cm" svg:height="12.065cm" svg:x="1.4cm" svg:y="3.685cm" presentation:class="outline" presentation:user-transformed="true">
          <draw:text-box>
            <text:list text:style-name="L2">
              <text:list-item>
                <text:p><text:span text:style-name="T3">Crie nova pasta e escolha uma imagem</text:span></text:p>
              </text:list-item>
              <text:list-item>
                <text:p><text:span text:style-name="T3">Repair &gt; Upscale(s)</text:span></text:p>
              </text:list-item>
              <text:list-item>
                <text:p><text:span text:style-name="T3">Utilize a </text:span><text:span text:style-name="T7">mesa de luz</text:span><text:span text:style-name="T3"> para comparar e ver se tem áreas sub/sobre expostas</text:span></text:p>
              </text:list-item>
              <text:list-item>
                <text:p text:style-name="P3"><text:span text:style-name="T3">Utilize o Sincronizar</text:span></text:p>
              </text:list-item>
              <text:list-item>
                <text:p text:style-name="P3"><text:span text:style-name="T3">Veja a informação na aba Versões (barra direita)</text:span></text:p>
              </text:list-item>
              <text:list-item>
                <text:p><text:span text:style-name="T8">Estrela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13 – Pesquisa avançada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Legenda: itens comentados por… DM</text:p>
              </text:list-item>
              <text:list-item>
                <text:p>Itens JPG não geo-referenciados</text:p>
              </text:list-item>
              <text:list-item>
                <text:p>“Boavista” do Criador Egídio Santo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14 – Exportar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Escolha 10 imagens </text:p>
              </text:list-item>
              <text:list-item>
                <text:p>Usar GFL para limpar todos metadados</text:p>
              </text:list-item>
              <text:list-item>
                <text:p>Inserir metadados mas apenas uma língua</text:p>
              </text:list-item>
              <text:list-item>
                <text:p>Ferramentas &gt; Exportar para um Armazenamento Local</text:p>
              </text:list-item>
              <text:list-item>
                <text:p>Copiar mas Inclua sideca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layer="layout" svg:width="26.998cm" svg:height="12.164cm" svg:x="0.5cm" svg:y="0.6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 table:number-columns-spanned="3">
                <text:p text:style-name="P6"><text:span text:style-name="T1">digiKam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 table:style-name="bg-none">
                <text:p text:style-name="P7"><text:span text:style-name="T1">Dublin Core</text:span></text:p>
                <text:p text:style-name="P7"><text:span text:style-name="T1">DCMES</text:span></text:p>
              </table:table-cell>
              <table:table-cell>
                <text:p text:style-name="P8">Barra Lateral / Legendas</text:p>
              </table:table-cell>
              <table:table-cell>
                <text:p text:style-name="P8">Editar os Meta-Dados (Editar o XMP)</text:p>
              </table:table-cell>
              <table:table-cell>
                <text:p text:style-name="P8">Modelos de meta-dados</text:p>
              </table:table-cell>
            </table:table-row>
            <table:table-row table:style-name="ro3" table:default-cell-style-name="bg-none">
              <table:table-cell table:style-name="ce4">
                <text:p text:style-name="P9">dc:title</text:p>
              </table:table-cell>
              <table:table-cell>
                <text:p text:style-name="P10">Descrição &gt; Título</text:p>
              </table:table-cell>
              <table:table-cell>
                <text:p text:style-name="P10">Estado &gt; Título</text:p>
              </table:table-cell>
              <table:table-cell/>
            </table:table-row>
            <table:table-row table:style-name="ro2" table:default-cell-style-name="bg-none">
              <table:table-cell table:style-name="ce4">
                <text:p text:style-name="P9">dc:description</text:p>
              </table:table-cell>
              <table:table-cell>
                <text:p text:style-name="P10">Descrição &gt; Legendas</text:p>
              </table:table-cell>
              <table:table-cell>
                <text:p text:style-name="P10">Conteúdo &gt; Legendas</text:p>
              </table:table-cell>
              <table:table-cell/>
            </table:table-row>
            <table:table-row table:style-name="ro3" table:default-cell-style-name="bg-none">
              <table:table-cell table:style-name="ce4">
                <text:p text:style-name="P9">dc:subject</text:p>
              </table:table-cell>
              <table:table-cell>
                <text:p text:style-name="P10">Marcas</text:p>
              </table:table-cell>
              <table:table-cell>
                <text:p text:style-name="P10">Palavras-chave</text:p>
              </table:table-cell>
              <table:table-cell/>
            </table:table-row>
            <table:table-row table:style-name="ro2" table:default-cell-style-name="bg-none">
              <table:table-cell table:style-name="ce4">
                <text:p text:style-name="P9">dc:creator</text:p>
              </table:table-cell>
              <table:table-cell/>
              <table:table-cell>
                <text:p text:style-name="P10">Créditos &gt; Criador</text:p>
              </table:table-cell>
              <table:table-cell>
                <text:p text:style-name="P10">Permissões &gt; Nomes dos Autores</text:p>
              </table:table-cell>
            </table:table-row>
            <table:table-row table:style-name="ro3" table:default-cell-style-name="bg-none">
              <table:table-cell table:style-name="ce4">
                <text:p text:style-name="P9">dc:rights</text:p>
              </table:table-cell>
              <table:table-cell/>
              <table:table-cell>
                <text:p text:style-name="P10">Conteúdo &gt; Copyright</text:p>
              </table:table-cell>
              <table:table-cell>
                <text:p text:style-name="P10">Permissões &gt; Copyright</text:p>
              </table:table-cell>
            </table:table-row>
            <table:table-row table:style-name="ro3" table:default-cell-style-name="bg-none">
              <table:table-cell table:style-name="ce4">
                <text:p text:style-name="P9">dc:source</text:p>
              </table:table-cell>
              <table:table-cell/>
              <table:table-cell>
                <text:p text:style-name="P10">Créditos &gt; Origem</text:p>
              </table:table-cell>
              <table:table-cell>
                <text:p text:style-name="P10">Permissões &gt; Origem</text:p>
              </table:table-cell>
            </table:table-row>
            <table:table-row table:style-name="ro3" table:default-cell-style-name="bg-none">
              <table:table-cell table:style-name="ce4">
                <text:p text:style-name="P9">dc:language</text:p>
              </table:table-cell>
              <table:table-cell/>
              <table:table-cell>
                <text:p text:style-name="P10">Propriedades &gt; Língua</text:p>
              </table:table-cell>
              <table:table-cell/>
            </table:table-row>
            <table:table-row table:style-name="ro3" table:default-cell-style-name="bg-none">
              <table:table-cell>
                <text:p text:style-name="P10">dc:identifier</text:p>
              </table:table-cell>
              <table:table-cell/>
              <table:table-cell/>
              <table:table-cell/>
            </table:table-row>
            <table:table-row table:style-name="ro3" table:default-cell-style-name="bg-none">
              <table:table-cell>
                <text:p text:style-name="P10">identifier</text:p>
              </table:table-cell>
              <table:table-cell/>
              <table:table-cell>
                <text:p text:style-name="P10">Estado &gt; Identificadores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26.849cm" svg:height="0.962cm" svg:x="0.651cm" svg:y="14.1cm">
          <draw:text-box>
            <text:p text:style-name="P11">dc:type, dc:contributor, dc:coverage, dc:date, df:format, dc:identifier, de:publisher, dc:relation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refa 15 – OpenRefine!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Criar projeto com todos os XMP</text:p>
              </text:list-item>
              <text:list-item>
                <text:p><text:span text:style-name="T1">Em rows</text:span> File &gt; Edit Cells &gt; Blank down</text:p>
              </text:list-item>
              <text:list-item>
                <text:p text:style-name="P3">Remover colunas (All)</text:p>
              </text:list-item>
              <text:list-item>
                <text:p text:style-name="P3">File &gt; Edit Cels &gt; Replace (tirar .xmp)</text:p>
              </text:list-item>
              <text:list-item>
                <text:p><text:span text:style-name="T1">Se colunas com várias rows</text:span> Edit cells&gt;Join multi-valued cells e usar pipes</text:p>
              </text:list-item>
              <text:list-item>
                <text:p>Exportar CSV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2">Tarefa 16 – Melhor OpenRefine!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ll &gt; Edit all columns &gt; Trim… &amp; Collapse...</text:p>
              </text:list-item>
              <text:list-item>
                <text:p>Renomear colunas dc:title xml:lang="en"</text:p>
              </text:list-item>
              <text:list-item>
                <text:p text:style-name="P3">Em vez do Join, fazer Edit column &gt; Split into…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2">Tarefa 17 – Metadados 2 língua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5:04:08.957479658</meta:creation-date>
    <dc:date>2026-07-05T21:51:21.237479984</dc:date>
    <meta:editing-duration>PT10H15M20S</meta:editing-duration>
    <meta:editing-cycles>63</meta:editing-cycles>
    <meta:generator>LibreOffice/26.2.4.2$Linux_X86_64 LibreOffice_project/3346a99e6b841765b75a9b29714a5b95c6761ce3</meta:generator>
    <meta:document-statistic meta:object-count="98"/>
  </office:meta>
</office:document-meta>
</file>