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DigiKam tem...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Image editor</text:p>
              </text:list-item>
              <text:list-item>
                <text:p>Light Table</text:p>
              </text:list-item>
              <text:list-item>
                <text:p>Batch Queue manager</text:p>
              </text:list-item>
              <text:list-item>
                <text:p>Survey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Tag Manager</text:p>
              </text:list-item>
              <text:list-item>
                <text:p>Template Editor</text:p>
              </text:list-item>
              <text:list-item>
                <text:p>Import tool</text:p>
              </text:list-item>
              <text:list-item>
                <text:p>Edit Metadata</text:p>
              </text:list-item>
              <text:list-item>
                <text:p>Edit Geoloca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Interface do DigiKam tem...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Menu bar</text:p>
              </text:list-item>
              <text:list-item>
                <text:p>Status bar</text:p>
              </text:list-item>
              <text:list-item>
                <text:p>Toolbar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Thumbnails</text:p>
              </text:list-item>
              <text:list-item>
                <text:p>Preview</text:p>
              </text:list-item>
              <text:list-item>
                <text:p>Map</text:p>
              </text:list-item>
              <text:list-item>
                <text:p>Tabl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Interface do DigiKam tem...</text:p>
          </draw:text-box>
        </draw:frame>
        <draw:frame presentation:style-name="pr2" draw:layer="layout" svg:width="12.297cm" svg:height="11.815cm" svg:x="1.4cm" svg:y="3.685cm" presentation:class="outline" presentation:user-transformed="true">
          <draw:text-box>
            <text:p><text:span text:style-name="T1">Sidebar_L</text:span></text:p>
            <text:list text:style-name="L2">
              <text:list-item>
                <text:p>Albums</text:p>
              </text:list-item>
              <text:list-item>
                <text:p>Tags e Labels</text:p>
              </text:list-item>
              <text:list-item>
                <text:p>Dates e Timeline</text:p>
              </text:list-item>
              <text:list-item>
                <text:p>Search</text:p>
              </text:list-item>
              <text:list-item>
                <text:p>Similarity</text:p>
              </text:list-item>
              <text:list-item>
                <text:p>Map</text:p>
              </text:list-item>
              <text:list-item>
                <text:p>People</text:p>
              </text:list-item>
            </text:list>
          </draw:text-box>
        </draw:frame>
        <draw:frame presentation:style-name="pr2" draw:text-style-name="P2" draw:layer="layout" svg:width="12.297cm" svg:height="11.815cm" svg:x="14.313cm" svg:y="3.685cm" presentation:class="outline" presentation:user-transformed="true">
          <draw:text-box>
            <text:p text:style-name="P2"><text:span text:style-name="T2">Sidebar_R</text:span></text:p>
            <text:list text:style-name="L2">
              <text:list-item>
                <text:p text:style-name="P2"><text:span text:style-name="T3">Properties, Metadata, Colors</text:span></text:p>
              </text:list-item>
              <text:list-item>
                <text:p text:style-name="P2"><text:span text:style-name="T3">Map</text:span></text:p>
              </text:list-item>
              <text:list-item>
                <text:p text:style-name="P2"><text:span text:style-name="T3">Captions</text:span></text:p>
              </text:list-item>
              <text:list-item>
                <text:p text:style-name="P2"><text:span text:style-name="T3">Versions</text:span></text:p>
              </text:list-item>
              <text:list-item>
                <text:p text:style-name="P2"><text:span text:style-name="T3">Filters</text:span></text:p>
              </text:list-item>
              <text:list-item>
                <text:p text:style-name="P2"><text:span text:style-name="T3">Tool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refa 1 - Configuraçõ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inguagem e Tema</text:p>
              </text:list-item>
              <text:list-item>
                <text:p>Acrescentar PDF e SVG aos Mime Types</text:p>
              </text:list-item>
              <text:list-item>
                <text:p>Configurar barra de ferramentas (Edit Geo e Edit Metadata)</text:p>
              </text:list-item>
              <text:list-item>
                <text:p>Ver &gt; Incluir Sub-árvore do álbum</text:p>
              </text:list-item>
              <text:list-item>
                <text:p text:style-name="P3">Vista<text:span text:style-name="T4">s &gt; Mostrar tudo nos Ícones</text:span></text:p>
              </text:list-item>
              <text:list-item>
                <text:p><text:span text:style-name="T4">Vistas &gt; Inserir Novas Categori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Tarefa 2 – Configurações de Metadad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tivar gravação de todos os Metadados</text:p>
              </text:list-item>
              <text:list-item>
                <text:p>Leitura e escrita com ExifTool, incluir DNG</text:p>
              </text:list-item>
              <text:list-item>
                <text:p>Sincronização <text:span text:style-name="T5">Lazy</text:span></text:p>
              </text:list-item>
              <text:list-item>
                <text:p><text:span text:style-name="T6">Reler ficheiros quando modificados</text:span></text:p>
              </text:list-item>
              <text:list-item>
                <text:p><text:span text:style-name="T6">Gravar no item e </text:span><text:span text:style-name="T5">sidecar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Tarefa 3 – Organização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3">Adicionar Colecção</text:p>
              </text:list-item>
              <text:list-item>
                <text:p>Criar pasta IMPORT para imagens_sessao_1.zip</text:p>
              </text:list-item>
              <text:list-item>
                <text:p>Criar sistema de pastas (YYYY-MM ou Temas). Mínimo 5 pastas. Cada pasta terá um mínimo de 5 imagens.</text:p>
              </text:list-item>
              <text:list-item>
                <text:p>Utiliza <text:span text:style-name="T1">Copiar para</text:span> e não mover imagens</text:p>
              </text:list-item>
              <text:list-item>
                <text:p>Renomear cópias (incluir prefixo com Sessao1_)</text:p>
              </text:list-item>
              <text:list-item>
                <text:p>Agrupa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<text:span text:style-name="T7">Tarefa 4 – Survey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Classificar e Labeling (estrela, cor e flag)</text:p>
              </text:list-item>
              <text:list-item>
                <text:p>Tags (cada com 3 tags mínimo)</text:p>
              </text:list-item>
              <text:list-item>
                <text:p>Captions (título e legenda)</text:p>
              </text:list-item>
              <text:list-item>
                <text:p>Captions: datas (mínimo 5 anos diferentes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arefa 5 – Converter no BQ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ver non-JPG para nova pasta</text:p>
              </text:list-item>
              <text:list-item>
                <text:p>Converter RAWs para DNG e JPG no BQM</text:p>
              </text:list-item>
              <text:list-item>
                <text:p text:style-name="P3"><text:span text:style-name="T8">Converter restantes para JPG </text:span><text:s/>no BQM</text:p>
              </text:list-item>
              <text:list-item>
                <text:p>Apagar RAWs</text:p>
              </text:list-item>
              <text:list-item>
                <text:p>Mover JPG para pastas organizadas</text:p>
              </text:list-item>
              <text:list-item>
                <text:p>Classificar, tags os JP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arefa 6 – Geocode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eoreferenciar todas imagens com ferramenta Editar a localização geográfica</text:p>
              </text:list-item>
              <text:list-item>
                <text:p>Altitude</text:p>
              </text:list-item>
              <text:list-item>
                <text:p>Pesquisar (geonames/osm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arefa 7 – Filtra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8">Marcas </text:span><text:s/>(barra esquerda)</text:p>
              </text:list-item>
              <text:list-item>
                <text:p>Datas e Timeline (barra esquerda)</text:p>
              </text:list-item>
              <text:list-item>
                <text:p text:style-name="P3"><text:span text:style-name="T8">Search (simples) </text:span><text:s/>(barra esquerda)</text:p>
              </text:list-item>
              <text:list-item>
                <text:p text:style-name="P3"><text:span text:style-name="T8">Filtros: propriedades e marcas </text:span><text:s/>(barra direita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refa 8 – Gestor de marca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3">Organizar árvore das marcas</text:p>
              </text:list-item>
              <text:list-item>
                <text:p text:style-name="P3">Criar marcas novas</text:p>
              </text:list-item>
              <text:list-item>
                <text:p text:style-name="P3">Exportar lista de tags</text:p>
              </text:list-item>
              <text:list-item>
                <text:p text:style-name="P3">Trocar com alguém</text:p>
              </text:list-item>
              <text:list-item>
                <text:p text:style-name="P3">Importar lista de ta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refa 9 – Remover repetid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3">Semelhança: apague as cópias que não se justificam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arefa 10 – Modelo de metadad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3">Criar modelo com Museu do Douro no <text:span text:style-name="T1">Copyright</text:span> e seu nome no <text:span text:style-name="T1">Autores</text:span></text:p>
              </text:list-item>
              <text:list-item>
                <text:p text:style-name="P3">Aplicar modelo a todas imagens de uma past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refa 11 – Image editor e versõ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tilize o Image editor para introduzir alterações em 3 imagens diferentes</text:p>
              </text:list-item>
              <text:list-item>
                <text:p>Grave sempre como nova versão</text:p>
              </text:list-item>
              <text:list-item>
                <text:p>Utilize a mesa de luz para comparar pares e ver se tem áreas sub/sobre expostas</text:p>
              </text:list-item>
              <text:list-item>
                <text:p>Veja a informação na aba Versões (barra direit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Tarefa 12 – Marca de água no BQ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tilize o BQM para introduzir uma marca de água de texto em várias imagens de uma mesma pas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17T15:04:08.957479658</meta:creation-date>
    <dc:date>2026-06-18T19:42:26.077169318</dc:date>
    <meta:editing-duration>PT3H35M18S</meta:editing-duration>
    <meta:editing-cycles>11</meta:editing-cycles>
    <meta:generator>LibreOffice/26.2.3.2$Linux_X86_64 LibreOffice_project/d4d5ed47b6084125f28d269a5650105d54dde034</meta:generator>
    <meta:document-statistic meta:object-count="84"/>
  </office:meta>
</office:document-meta>
</file>