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Tarefa 1 – duplicados com Krokiet</text:p>
          </draw:text-box>
        </draw:frame>
        <draw:frame presentation:style-name="pr2" draw:layer="layout" svg:width="26.1cm" svg:height="11.815cm" svg:x="1.4cm" svg:y="3.686cm" presentation:class="outline" presentation:user-transformed="true">
          <draw:text-box>
            <text:list text:style-name="L2">
              <text:list-item>
                <text:p><text:span text:style-name="T1">Descarregar </text:span><text:span text:style-name="T2">https://github.com/qarmin/czkawka/releases</text:span></text:p>
              </text:list-item>
              <text:list-item>
                <text:p><text:span text:style-name="T2">Settings </text:span><text:span text:style-name="T3">&gt;</text:span><text:span text:style-name="T2"> Idioma </text:span><text:span text:style-name="T3">(?)</text:span></text:p>
              </text:list-item>
              <text:list-item>
                <text:p><text:span text:style-name="T2">Add</text:span><text:span text:style-name="T3"> (diretórios) &gt; </text:span><text:span text:style-name="T2">Duplicate Files</text:span><text:span text:style-name="T3"> e/ou </text:span><text:span text:style-name="T2">Similar </text:span><text:span text:style-name="T2">Images</text:span></text:p>
              </text:list-item>
              <text:list-item>
                <text:p><text:span text:style-name="T2">Search </text:span><text:span text:style-name="T3">(Rever? Remover?)</text:span></text:p>
              </text:list-item>
              <text:list-item>
                <text:p><text:span text:style-name="T2">Save resul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Tarefa 2 – Tabela no OpenRefine</text:p>
          </draw:text-box>
        </draw:frame>
        <draw:frame presentation:style-name="pr2" draw:layer="layout" svg:width="26.1cm" svg:height="11.815cm" svg:x="1.4cm" svg:y="3.686cm" presentation:class="outline" presentation:user-transformed="true">
          <draw:text-box>
            <text:list text:style-name="L2">
              <text:list-item>
                <text:p><text:span text:style-name="T2">Abrir no OpenRefine</text:span><text:span text:style-name="T3"> (json)</text:span></text:p>
              </text:list-item>
              <text:list-item>
                <text:p><text:span text:style-name="T2">Export Templating!</text:span></text:p>
              </text:list-item>
              <text:list-item>
                <text:p><text:span text:style-name="T2">Usar template</text:span></text:p>
              </text:list-item>
              <text:list-item>
                <text:p><text:span text:style-name="T3">Renomear ficheiro (de .txt para .html)</text:span></text:p>
              </text:list-item>
              <text:list-item>
                <text:p><text:span text:style-name="T3">Browser</text:span><text:span text:style-name="T2"> </text:span><text:span text:style-name="T3">&gt; PDF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Tarefa 3 – digiKam HTML &gt; pdf</text:p>
          </draw:text-box>
        </draw:frame>
        <draw:frame presentation:style-name="pr2" draw:text-style-name="P2" draw:layer="layout" svg:width="26.1cm" svg:height="11.815cm" svg:x="1.4cm" svg:y="3.686cm" presentation:class="outline" presentation:user-transformed="true">
          <draw:text-box>
            <text:list text:style-name="L2">
              <text:list-item>
                <text:p><text:span text:style-name="T1">Descarregar e descompactar</text:span></text:p>
                <text:p><text:span text:style-name="T2">museu-douro-album.zip</text:span><text:span text:style-name="T1"> de </text:span><text:span text:style-name="T2">https://github.com/projetoalfobre/MDouro-2026-imagem2d/tree/main/sessao4</text:span></text:p>
              </text:list-item>
              <text:list-item>
                <text:p><text:span text:style-name="T1">Colocar na pasta</text:span></text:p>
                <text:p><text:span text:style-name="T2">C:\Users\%USERNAME%\AppData\Local\digikam\theme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Tarefa 4 – digiKam HTML &gt; pdf</text:p>
          </draw:text-box>
        </draw:frame>
        <draw:frame presentation:style-name="pr2" draw:text-style-name="P2" draw:layer="layout" svg:width="26.1cm" svg:height="11.815cm" svg:x="1.4cm" svg:y="3.686cm" presentation:class="outline" presentation:user-transformed="true">
          <draw:text-box>
            <text:list text:style-name="L2">
              <text:list-item>
                <text:p><text:span text:style-name="T1">(digiKam) Selecionar imagens</text:span></text:p>
              </text:list-item>
              <text:list-item>
                <text:p><text:span text:style-name="T1">Ferramentas &gt; Criar uma Galeria HTML</text:span></text:p>
              </text:list-item>
              <text:list-item>
                <text:p><text:span text:style-name="T1">Tema = Museu do Douro – Álbum PDF</text:span></text:p>
              </text:list-item>
              <text:list-item>
                <text:p><text:span text:style-name="T2">Opções</text:span></text:p>
              </text:list-item>
              <text:list-item>
                <text:p><text:span text:style-name="T2">Formato, Qualidade </text:span><text:span text:style-name="T3">e</text:span><text:span text:style-name="T2"> Tamanho máx.!</text:span></text:p>
              </text:list-item>
              <text:list-item>
                <text:p><text:span text:style-name="T3">Título e Destino</text:span></text:p>
              </text:list-item>
              <text:list-item>
                <text:p><text:span text:style-name="T3">Imprimir página web em pdf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5:04:08.957479658</meta:creation-date>
    <dc:date>2026-07-16T12:52:07.257385352</dc:date>
    <meta:editing-duration>PT11H47M2S</meta:editing-duration>
    <meta:editing-cycles>75</meta:editing-cycles>
    <meta:generator>LibreOffice/26.2.4.2$Linux_X86_64 LibreOffice_project/3346a99e6b841765b75a9b29714a5b95c6761ce3</meta:generator>
    <meta:document-statistic meta:object-count="37"/>
  </office:meta>
</office:document-meta>
</file>