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style:paragraph-properties fo:margin-top="0.5cm" fo:margin-bottom="0cm"/>
    </style:style>
    <style:style style:name="P2" style:family="paragraph">
      <style:text-properties fo:font-size="36pt" style:font-size-asian="36pt" style:font-size-complex="36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>Tarefa 0 – descarregar imagens</text:p>
          </draw:text-box>
        </draw:frame>
        <draw:frame presentation:style-name="pr2" draw:text-style-name="P2" draw:layer="layout" svg:width="26.1cm" svg:height="11.815cm" svg:x="1.4cm" svg:y="3.686cm" presentation:class="outline" presentation:user-transformed="true">
          <draw:text-box>
            <text:list text:style-name="L2">
              <text:list-item>
                <text:p text:style-name="P1"><text:span text:style-name="T1">Descarregar e descompactar zip de imagens de </text:span><text:span text:style-name="T2">https://github.com/projetoalfobre/MDouro-202</text:span><text:span text:style-name="T2">6-imagem2d/tree/main/sessao4/</text:span></text:p>
              </text:list-item>
              <text:list-item>
                <text:p><text:span text:style-name="T1">Colocar pasta dentro de coleção digikam </text:span><text:span text:style-name="T1">existente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user-transformed="true">
          <draw:text-box>
            <text:p text:style-name="P4">Tarefa 1 – Preferências do GIMP</text:p>
          </draw:text-box>
        </draw:frame>
        <draw:frame presentation:style-name="pr2" draw:layer="layout" svg:width="26.1cm" svg:height="11.815cm" svg:x="1.4cm" svg:y="3.685cm" presentation:class="outline" presentation:user-transformed="true">
          <draw:text-box>
            <text:list text:style-name="L2">
              <text:list-item>
                <text:p>Editar &gt; Preferências &gt; <text:span text:style-name="T3">Interface</text:span> (<text:span text:style-name="T4">Idioma</text:span>), <text:span text:style-name="T3">Tema</text:span> e <text:span text:style-name="T3">Gestão de janelas</text:span><text:span text:style-name="T5"> (Repor janelas e </text:span><text:span text:style-name="T5">Repor)</text:span></text:p>
              </text:list-item>
              <text:list-item>
                <text:p text:style-name="P1">Editar &gt; Preferências &gt; <text:span text:style-name="T3">Importar e exportar </text:span><text:span text:style-name="T3">imagens</text:span></text:p>
              </text:list-item>
              <text:list-item>
                <text:p text:style-name="P1">PhotoGIMP https://github.com/Diolinux/Photogim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user-transformed="true">
          <draw:text-box>
            <text:p text:style-name="P4">Tarefa 2 – Início do GIMP</text:p>
          </draw:text-box>
        </draw:frame>
        <draw:frame presentation:style-name="pr2" draw:layer="layout" svg:width="26.1cm" svg:height="11.815cm" svg:x="1.4cm" svg:y="3.685cm" presentation:class="outline" presentation:user-transformed="true">
          <draw:text-box>
            <text:list text:style-name="L2">
              <text:list-item>
                <text:p>Interface: Menus, Ferramentas e Opções de Ferramentas, Painéis / Abas</text:p>
              </text:list-item>
              <text:list-item>
                <text:p><text:span text:style-name="T3">Abrir imagens JPG e SVG</text:span></text:p>
              </text:list-item>
              <text:list-item>
                <text:p><text:span text:style-name="T3">Abrir SVG em camada</text:span></text:p>
              </text:list-item>
              <text:list-item>
                <text:p>Alguns atalhos <text:s/>úteis: Zoom (CTRL+BMR ou rodar), Pan (BMR), Rodar (SHIFT+BMR), Recentrar (SHIFT+J), Scroll (Rodar BMR no Scroll)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user-transformed="true">
          <draw:text-box>
            <text:p text:style-name="P4">Tarefa 3 – Grelhas e Guias</text:p>
          </draw:text-box>
        </draw:frame>
        <draw:frame presentation:style-name="pr2" draw:layer="layout" svg:width="26.1cm" svg:height="11.815cm" svg:x="1.4cm" svg:y="3.685cm" presentation:class="outline" presentation:user-transformed="true">
          <draw:text-box>
            <text:list text:style-name="L2">
              <text:list-item>
                <text:p text:style-name="P1">Mostrar e Atrair Guias e Grelha</text:p>
              </text:list-item>
              <text:list-item>
                <text:p>Configurar grelha (Preferências ou Imagem)</text:p>
              </text:list-item>
              <text:list-item>
                <text:p>Criar 2 Guias Hor e Ver no Menu <text:span text:style-name="T3">Imagem</text:span> (⅓)</text:p>
              </text:list-item>
              <text:list-item>
                <text:p>Criar guias H/V na régua</text:p>
              </text:list-item>
              <text:list-item>
                <text:p>Mover e remover guia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473cm" svg:x="1.4cm" svg:y="0.206cm" presentation:class="title" presentation:user-transformed="true">
          <draw:text-box>
            <text:p text:style-name="P4">Tarefa 4 – Área de trabalho, imagem e camadas</text:p>
          </draw:text-box>
        </draw:frame>
        <draw:frame presentation:style-name="pr2" draw:layer="layout" svg:width="26.1cm" svg:height="11.815cm" svg:x="1.4cm" svg:y="3.685cm" presentation:class="outline" presentation:user-transformed="true">
          <draw:text-box>
            <text:list text:style-name="L2">
              <text:list-item>
                <text:p>Navegar entre imagens e camadas</text:p>
              </text:list-item>
              <text:list-item>
                <text:p>Abrir imagens e camadas com drag and drop</text:p>
              </text:list-item>
              <text:list-item>
                <text:p>Tamanho de impressão</text:p>
              </text:list-item>
              <text:list-item>
                <text:p>Metadados</text:p>
              </text:list-item>
              <text:list-item>
                <text:p text:style-name="P1">Guardar e Exportar (formatos e compressão)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user-transformed="true">
          <draw:text-box>
            <text:p>Tarefa 5 – Camadas</text:p>
          </draw:text-box>
        </draw:frame>
        <draw:frame presentation:style-name="pr2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 text:style-name="P1">Criar 3 camadas 500x500 Cor 1º plano, Branco e Transparente</text:p>
              </text:list-item>
              <text:list-item>
                <text:p text:style-name="P1">Deslocar camadas</text:p>
              </text:list-item>
              <text:list-item>
                <text:p text:style-name="P1">Modos e opacidade</text:p>
              </text:list-item>
              <text:list-item>
                <text:p text:style-name="P1"><text:span text:style-name="T3">Adicionar canal Alpha</text:span></text:p>
              </text:list-item>
              <text:list-item>
                <text:p text:style-name="P1">Trancar camadas</text:p>
              </text:list-item>
              <text:list-item>
                <text:p text:style-name="P1">Fundir camadas / Achatar imagem</text:p>
              </text:list-item>
              <text:list-item>
                <text:p text:style-name="P1">Remover camada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user-transformed="true">
          <draw:text-box>
            <text:p>Tarefa 6 – Grupos de Camadas</text:p>
          </draw:text-box>
        </draw:frame>
        <draw:frame presentation:style-name="pr2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 text:style-name="P1"><text:span text:style-name="T3">Criar grupo e arrastar 2 camadas para dentro</text:span></text:p>
              </text:list-item>
              <text:list-item>
                <text:p text:style-name="P1">Modos e opacidade do grupo</text:p>
              </text:list-item>
              <text:list-item>
                <text:p text:style-name="P1">Trancar camadas e grupo</text:p>
              </text:list-item>
              <text:list-item>
                <text:p text:style-name="P1">Transformações no grupo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user-transformed="true">
          <draw:text-box>
            <text:p>Tarefa 7 – Redimensionar</text:p>
          </draw:text-box>
        </draw:frame>
        <draw:frame presentation:style-name="pr2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1"><text:span text:style-name="T3">Redimensionar Tamanho da imagem</text:span></text:p>
              </text:list-item>
              <text:list-item>
                <text:p text:style-name="P1"><text:span text:style-name="T3">Redimensionar Tamanho da área de trabalho</text:span></text:p>
              </text:list-item>
              <text:list-item>
                <text:p text:style-name="P1"><text:span text:style-name="T3">Alterar tamanho de camadas no menu Camada e na ferramenta</text:span></text:p>
              </text:list-item>
              <text:list-item>
                <text:p text:style-name="P1"><text:span text:style-name="T3">2 camadas com 20% da imagem (*0.2)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user-transformed="true">
          <draw:text-box>
            <text:p>Tarefa 8 – Alinhar</text:p>
          </draw:text-box>
        </draw:frame>
        <draw:frame presentation:style-name="pr2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1"><text:span text:style-name="T3">Duplicar uma camada</text:span></text:p>
              </text:list-item>
              <text:list-item>
                <text:p text:style-name="P1"><text:span text:style-name="T3">Alinhar camadas ao topo (relativamente ao </text:span><text:span text:style-name="T3">selecionado)</text:span></text:p>
              </text:list-item>
              <text:list-item>
                <text:p text:style-name="P1"><text:span text:style-name="T3">Alinhar grupo ao centro da imagem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><text:span text:style-name="T6">Tarefa 9 – Recortar</text:span></text:p>
          </draw:text-box>
        </draw:frame>
        <draw:frame presentation:style-name="pr2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Recortar Imagem e Camada</text:p>
              </text:list-item>
              <text:list-item>
                <text:p><text:span text:style-name="T3">Ferramenta de recorte</text:span></text:p>
              </text:list-item>
              <text:list-item>
                <text:p>Fixar proporção</text:p>
              </text:list-item>
              <text:list-item>
                <text:p>Guias do recortado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user-transformed="true">
          <draw:text-box>
            <text:p>Tarefa 10 – Selecionar 1</text:p>
          </draw:text-box>
        </draw:frame>
        <draw:frame presentation:style-name="pr2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Seleção rectangular (cortar com/sem suavizar)</text:p>
              </text:list-item>
              <text:list-item>
                <text:p>Copiar e colar como nova camada</text:p>
              </text:list-item>
              <text:list-item>
                <text:p>Copiar e colar como nova imagem</text:p>
              </text:list-item>
              <text:list-item>
                <text:p>Selecionar tudo CTRL+A</text:p>
              </text:list-item>
              <text:list-item>
                <text:p>Remover seleção SHIFT+CTRL+A</text:p>
              </text:list-item>
              <text:list-item>
                <text:p>Inverter seleção CTRL+I 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user-transformed="true">
          <draw:text-box>
            <text:p>Tarefa 11 – Selecionar 2</text:p>
          </draw:text-box>
        </draw:frame>
        <draw:frame presentation:style-name="pr2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Seleção livre (+CTRL)</text:p>
              </text:list-item>
              <text:list-item>
                <text:p>Seleção com varinha mágica</text:p>
              </text:list-item>
              <text:list-item>
                <text:p>Seleção cores similares</text:p>
              </text:list-item>
              <text:list-item>
                <text:p>Seleção por tesoura</text:p>
              </text:list-item>
              <text:list-item>
                <text:p><text:span text:style-name="T3">Seleção 1º plano 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user-transformed="true">
          <draw:text-box>
            <text:p>Tarefa 12 – Transformadores</text:p>
          </draw:text-box>
        </draw:frame>
        <draw:frame presentation:style-name="pr2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1">Rodar</text:p>
              </text:list-item>
              <text:list-item>
                <text:p text:style-name="P1">Dimensão</text:p>
              </text:list-item>
              <text:list-item>
                <text:p text:style-name="P1">Inverter</text:p>
              </text:list-item>
              <text:list-item>
                <text:p text:style-name="P1"><text:span text:style-name="T3">Perspectiva</text:span></text:p>
              </text:list-item>
              <text:list-item>
                <text:p text:style-name="P1">Trans 3D</text:p>
              </text:list-item>
              <text:list-item>
                <text:p text:style-name="P1">Alça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user-transformed="true">
          <draw:text-box>
            <text:p>Tarefa 13 – Preencher</text:p>
          </draw:text-box>
        </draw:frame>
        <draw:frame presentation:style-name="pr2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1">Criar camadas transparente e...</text:p>
              </text:list-item>
              <text:list-item>
                <text:p text:style-name="P1"><text:span text:style-name="T3">Balde - Cor</text:span></text:p>
              </text:list-item>
              <text:list-item>
                <text:p text:style-name="P1"><text:span text:style-name="T3">Balde textura (criar texturas)</text:span></text:p>
              </text:list-item>
              <text:list-item>
                <text:p text:style-name="P1"><text:span text:style-name="T3">Balde gradiente (F/B e F/T)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user-transformed="true">
          <draw:text-box>
            <text:p>Tarefa 14 – Outras úteis</text:p>
          </draw:text-box>
        </draw:frame>
        <draw:frame presentation:style-name="pr2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1"><text:span text:style-name="T3">Clone e Remendar</text:span></text:p>
              </text:list-item>
              <text:list-item>
                <text:p text:style-name="P1">Esborratar</text:p>
              </text:list-item>
              <text:list-item>
                <text:p text:style-name="P1">Desfocar/Nitidez (CTRL)</text:p>
              </text:list-item>
              <text:list-item>
                <text:p text:style-name="P1">Escurecer/Clarear (CTRL)</text:p>
                <text:p text:style-name="P1"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user-transformed="true">
          <draw:text-box>
            <text:p>Tarefa 15 – Desenhar e Texto</text:p>
          </draw:text-box>
        </draw:frame>
        <draw:frame presentation:style-name="pr2" draw:layer="layout" svg:width="26.1cm" svg:height="11.815cm" svg:x="1.4cm" svg:y="3.685cm" presentation:class="outline" presentation:user-transformed="true">
          <draw:text-box>
            <text:list text:style-name="L2">
              <text:list-item>
                <text:p>Pintar: pincel, lápis e aerógrafo</text:p>
              </text:list-item>
              <text:list-item>
                <text:p>Borracha</text:p>
              </text:list-item>
              <text:list-item>
                <text:p>Pipeta</text:p>
              </text:list-item>
              <text:list-item>
                <text:p>Texto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user-transformed="true">
          <draw:text-box>
            <text:p>Tarefa 16 – Menu Cor</text:p>
          </draw:text-box>
        </draw:frame>
        <draw:frame presentation:style-name="pr2" draw:layer="layout" svg:width="26.1cm" svg:height="11.815cm" svg:x="1.4cm" svg:y="3.685cm" presentation:class="outline" presentation:user-transformed="true">
          <draw:text-box>
            <text:list text:style-name="L2">
              <text:list-item>
                <text:p>Automáticos: Eq Brancos e Realçar Cores</text:p>
              </text:list-item>
              <text:list-item>
                <text:p>Níveis e Curvas</text:p>
              </text:list-item>
              <text:list-item>
                <text:p>Dessaturação</text:p>
              </text:list-item>
              <text:list-item>
                <text:p>Sombras/Highlights</text:p>
              </text:list-item>
              <text:list-item>
                <text:p>..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user-transformed="true">
          <draw:text-box>
            <text:p>Tarefa 17 – Menu Filtros</text:p>
          </draw:text-box>
        </draw:frame>
        <draw:frame presentation:style-name="pr2" draw:layer="layout" svg:width="26.1cm" svg:height="11.815cm" svg:x="1.4cm" svg:y="3.685cm" presentation:class="outline" presentation:user-transformed="true">
          <draw:text-box>
            <text:list text:style-name="L2">
              <text:list-item>
                <text:p>Desfocar &gt; Desfocagem com foco e Gaussiana</text:p>
              </text:list-item>
              <text:list-item>
                <text:p>Melhorar &gt; Redução de ruído, Aumentar nitidez </text:p>
              </text:list-item>
              <text:list-item>
                <text:p>Luz e Sombra &gt; Sombra projetada</text:p>
              </text:list-item>
              <text:list-item>
                <text:p>Mapa &gt; Pequeno Planeta e Projecção em Panorama</text:p>
              </text:list-item>
              <text:list-item>
                <text:p>Instalar G’MIC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user-transformed="true">
          <draw:text-box>
            <text:p>Tarefa 18 – Foto e logo</text:p>
          </draw:text-box>
        </draw:frame>
        <draw:frame presentation:style-name="pr2" draw:layer="layout" svg:width="26.1cm" svg:height="11.815cm" svg:x="1.4cm" svg:y="3.685cm" presentation:class="outline" presentation:user-transformed="true">
          <draw:text-box>
            <text:list text:style-name="L2">
              <text:list-item>
                <text:p>Importar logo e adicionar alpha</text:p>
              </text:list-item>
              <text:list-item>
                <text:p>Selecionar cor e remover</text:p>
              </text:list-item>
              <text:list-item>
                <text:p>Retirar Saturação e Inverter</text:p>
              </text:list-item>
              <text:list-item>
                <text:p>Sompra projetada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user-transformed="true">
          <draw:text-box>
            <text:p>Tarefa 20 – Máscaras de camada</text:p>
          </draw:text-box>
        </draw:frame>
        <draw:frame presentation:style-name="pr2" draw:layer="layout" svg:width="26.1cm" svg:height="11.815cm" svg:x="1.4cm" svg:y="3.685cm" presentation:class="outline" presentation:user-transformed="true">
          <draw:text-box>
            <text:list text:style-name="L2">
              <text:list-item>
                <text:p>Imagem em duas camadas: cor e b/w</text:p>
              </text:list-item>
              <text:list-item>
                <text:p>BDR &gt; Adicionar máscaras de camada</text:p>
              </text:list-item>
              <text:list-item>
                <text:p>Pintar preto onde é trasnsparente</text:p>
              </text:list-item>
              <text:list-item>
                <text:p>ALT em cima da máscara</text:p>
              </text:list-item>
              <text:list-item>
                <text:p>Aplicar máscaras de camada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7T15:04:08.957479658</meta:creation-date>
    <dc:date>2026-07-16T17:11:32.967553805</dc:date>
    <meta:editing-duration>PT11H57M7S</meta:editing-duration>
    <meta:editing-cycles>75</meta:editing-cycles>
    <meta:generator>LibreOffice/26.2.4.2$Linux_X86_64 LibreOffice_project/3346a99e6b841765b75a9b29714a5b95c6761ce3</meta:generator>
    <meta:document-statistic meta:object-count="101"/>
  </office:meta>
</office:document-meta>
</file>