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Noto Sans Devanagari" style:font-size-complex="32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Noto Sans Devanagari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 – Configurações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Barra de ferramentas com Manutenção, Ajustar a Data &amp; Hora, Actualizar, Gestor de Marcas, Editar os Meta-Dados, Editar a Loc Geográfica</text:p>
              </text:list-item>
              <text:list-item>
                <text:p text:style-name="P1"><text:span text:style-name="T1">Diversos / Aparência: alterar formato de data para dd.mm.yyyy</text:span></text:p>
              </text:list-item>
              <text:list-item>
                <text:p text:style-name="P1"><text:span text:style-name="T1">Diversos / Localizar: Garantir que tem es-ES, en-US e pt-PT (mínimo) na línguas de tradu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2 – Organizar coleções e álbuns</text:p>
          </draw:text-box>
        </draw:frame>
        <draw:frame presentation:style-name="pr2" draw:layer="layout" svg:width="26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Crie uma pasta </text:span><text:span text:style-name="T3">Oficina-sessao2</text:span><text:span text:style-name="T4">.</text:span></text:p>
              </text:list-item>
              <text:list-item>
                <text:p text:style-name="P1"><text:span text:style-name="T4">Crie uma </text:span><text:span text:style-name="T5">coleção</text:span><text:span text:style-name="T4"> mapeada para essa pasta.</text:span></text:p>
              </text:list-item>
              <text:list-item>
                <text:p text:style-name="P1"><text:span text:style-name="T1">Crie pasta </text:span><text:span text:style-name="T3">Marcos</text:span><text:span text:style-name="T1"> dentro da pasta </text:span><text:span text:style-name="T3">Oficina-sessao2</text:span></text:p>
              </text:list-item>
              <text:list-item>
                <text:p text:style-name="P1"><text:span text:style-name="T1">Descarregue todos os ficheiros zip do repositório que estão na pasta </text:span><text:span text:style-name="T3">zips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3 – Importar imagens</text:p>
          </draw:text-box>
        </draw:frame>
        <draw:frame presentation:style-name="pr2" draw:layer="layout" svg:width="26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Descompacte docs.zip, galeria-site.zip, outros.zip, pessoas.zip e RAW.zip dentro da pasta </text:span><text:span text:style-name="T3">Oficina-sessao2</text:span></text:p>
              </text:list-item>
              <text:list-item>
                <text:p text:style-name="P1"><text:span text:style-name="T1">Descompacte desenhos.zip, fotografias.zip e videos.zip dentro da pasta Oficina-sessao2 &gt; </text:span><text:span text:style-name="T3">Marcos</text:span></text:p>
              </text:list-item>
              <text:list-item>
                <text:p text:style-name="P1"><text:span text:style-name="T1">A pasta exemplo ilustra a organização pretendida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4 – Organizar imagens</text:p>
          </draw:text-box>
        </draw:frame>
        <draw:frame presentation:style-name="pr2" draw:layer="layout" svg:width="26.6cm" svg:height="11.315cm" svg:x="1.4cm" svg:y="3.685cm" presentation:class="outline" presentation:user-transformed="true">
          <draw:text-box>
            <text:list text:style-name="L2">
              <text:list-item>
                <text:p text:style-name="P1">Mova as fotografias que estão dentro da pasta <text:span text:style-name="T5">desenhos</text:span> para dentro da pasta <text:span text:style-name="T5">fotografias</text:span></text:p>
              </text:list-item>
              <text:list-item>
                <text:p text:style-name="P1"><text:span text:style-name="T1">Mova os desenhos que estão dentro da pasta </text:span><text:span text:style-name="T3">fotografias</text:span><text:span text:style-name="T1"> para dentro da pasta </text:span><text:span text:style-name="T3">desenhos</text:span></text:p>
              </text:list-item>
              <text:list-item>
                <text:p text:style-name="P1"><text:span text:style-name="T1">Elimine as imagens de </text:span><text:span text:style-name="T3">galeria-site</text:span><text:span text:style-name="T1"> que não tenham referência geográfica no nome do ficheiro</text:span></text:p>
              </text:list-item>
              <text:list-item>
                <text:p text:style-name="P1"><text:span text:style-name="T1">Esvazie o Lix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5 – Gestor de Marcas 1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Importar vocabulários DCMI Type, Locais_administrativos e Designacao_fotografiaministrativos (pasta </text:span><text:span text:style-name="T3">docs</text:span><text:span text:style-name="T1">)</text:span></text:p>
              </text:list-item>
              <text:list-item>
                <text:p text:style-name="P3"><text:span text:style-name="T1">Criar duas árvores de Tags:</text:span></text:p>
                <text:list>
                  <text:list-item>
                    <text:p text:style-name="P4"><text:span text:style-name="T1">Douro: Vinha | Barragem | Socalcos | Rio</text:span></text:p>
                  </text:list-item>
                  <text:list-item>
                    <text:p text:style-name="P4"><text:span text:style-name="T1">Marcos: Desenho | Fotograf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6 – Gestor de Marcas 2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Editar ficheiro Locais_administrativos.txt e adicionar</text:span></text:p>
              </text:list-item>
            </text:list>
            <text:p text:style-name="P3"><text:span text:style-name="T1">Vila Real</text:span></text:p>
            <text:p text:style-name="P3"><text:span text:style-name="T1"><text:s text:c="10"/>Abaças</text:span></text:p>
            <text:p text:style-name="P3"><text:span text:style-name="T3"><text:s text:c="20"/>Quinta da Portela</text:span></text:p>
            <text:p text:style-name="P3"><text:span text:style-name="T3"><text:s text:c="20"/>Vilarinho do Tanha</text:span></text:p>
            <text:p text:style-name="P3"><text:span text:style-name="T3"><text:s text:c="20"/>Vila de Tanha</text:span></text:p>
            <text:p text:style-name="P3"><text:span text:style-name="T3"><text:s text:c="20"/>Selado</text:span></text:p>
            <text:p text:style-name="P3"><text:span text:style-name="T3"><text:s text:c="20"/>Quinta da Prelada</text:span></text:p>
            <text:list text:continue-numbering="true" text:style-name="L2">
              <text:list-item>
                <text:p text:style-name="P3"><text:span text:style-name="T1">Reimportar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6">Tarefa 7 – </text:span>Survey </text:p>
          </draw:text-box>
        </draw:frame>
        <draw:frame presentation:style-name="pr2" draw:layer="layout" svg:width="26.6cm" svg:height="12.06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Marcar imagens de </text:span><text:span text:style-name="T3">galeria-site</text:span><text:span text:style-name="T1"> com tags da árvore Douro </text:span></text:p>
                <text:list>
                  <text:list-item>
                    <text:p><text:span text:style-name="T7">Setas para esquerda e direita</text:span></text:p>
                  </text:list-item>
                </text:list>
              </text:list-item>
              <text:list-item>
                <text:p text:style-name="P1"><text:span text:style-name="T1">Utilize botão direito em cima da tag (</text:span><text:span text:style-name="T3">Comutar o Automático</text:span><text:span text:style-name="T1">) para marcar as marcas </text:span><text:span text:style-name="T8">mães</text:span><text:span text:style-name="T1">.</text:span></text:p>
              </text:list-item>
              <text:list-item>
                <text:p text:style-name="P1"><text:span text:style-name="T1">Fazer </text:span><text:span text:style-name="T8">culling</text:span><text:span text:style-name="T1"> das fotografias da pasta </text:span><text:span text:style-name="T3">galeria-site</text:span><text:span text:style-name="T1"> com atalhos de teclado</text:span></text:p>
                <text:list>
                  <text:list-item>
                    <text:p><text:span text:style-name="T1">CONTROL + 0/1/2/3/4/5 para Estrelas</text:span></text:p>
                  </text:list-item>
                  <text:list-item>
                    <text:p><text:span text:style-name="T1">ALT + 0/1/2/3 para Bandeira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8 – Geocode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eoreferenciar todas imagens da pasta <text:span text:style-name="T5">galeria-site</text:span></text:p>
              </text:list-item>
              <text:list-item>
                <text:p>Altitude</text:p>
              </text:list-item>
              <text:list-item>
                <text:p>Pesquisar (geonames/osm) com as referências geográficas que estão no nome do ficheiro</text:p>
              </text:list-item>
              <text:list-item>
                <text:p>Ajustar localização manualmente s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9 – Tradução automática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Utilize barra das Legendas/Descrição para introduzir título e descrição </text:span><text:span text:style-name="T3">em</text:span><text:span text:style-name="T1"> </text:span><text:span text:style-name="T3">português</text:span><text:span text:style-name="T1"> nas fotografias da pasta </text:span><text:span text:style-name="T3">outros</text:span></text:p>
              </text:list-item>
              <text:list-item>
                <text:p text:style-name="P1"><text:span text:style-name="T1">Utilize tradução automática para inglês</text:span></text:p>
              </text:list-item>
              <text:list-item>
                <text:p text:style-name="P1"><text:span text:style-name="T1">Utilize tradução automática para espanho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0 – Modelo de metadados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Crie modelo com </text:span><text:span text:style-name="T3">Autor</text:span><text:span text:style-name="T2">, </text:span><text:span text:style-name="T3">Créditos</text:span><text:span text:style-name="T1">, </text:span><text:span text:style-name="T5">Copyright</text:span> e <text:span text:style-name="T5">Contacto</text:span></text:p>
                <text:list>
                  <text:list-item>
                    <text:p text:style-name="P5"><text:span text:style-name="T4">Nome do criador da imagem</text:span></text:p>
                  </text:list-item>
                  <text:list-item>
                    <text:p text:style-name="P5"><text:span text:style-name="T4">[provider] Museu do Douro</text:span></text:p>
                  </text:list-item>
                  <text:list-item>
                    <text:p text:style-name="P4"><text:span text:style-name="T4">Copyright © Museu do Douro, 2026. A utilização desta imagem está sujeita a autorização prévia do Museu do Douro.</text:span></text:p>
                  </text:list-item>
                </text:list>
              </text:list-item>
              <text:list-item>
                <text:p text:style-name="P1">Aplicar modelo a todas imagens da pasta <text:span text:style-name="T5">outr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1 – Gestor de Fila de Lote</text:p>
          </draw:text-box>
        </draw:frame>
        <draw:frame presentation:style-name="pr2" draw:layer="layout" svg:width="26.6cm" svg:height="12.065cm" svg:x="1.4cm" svg:y="3.685cm" presentation:class="outline" presentation:user-transformed="true">
          <draw:text-box>
            <text:list text:style-name="L2">
              <text:list-item>
                <text:p text:style-name="P1"><text:span text:style-name="T9">Crie uma configuração para…</text:span></text:p>
                <text:list>
                  <text:list-item>
                    <text:p><text:span text:style-name="T9">Converter fotos da pasta RAW para DNG</text:span></text:p>
                  </text:list-item>
                  <text:list-item>
                    <text:p><text:span text:style-name="T1">Gravar conversões na pasta </text:span><text:span text:style-name="T3">outros</text:span></text:p>
                  </text:list-item>
                  <text:list-item>
                    <text:p><text:span text:style-name="T1">Personalizar nome dos novos ficheiros com…</text:span></text:p>
                    <text:p><text:span text:style-name="T1">MD-ARQ_[file]_em_[date:"ddmmyyyy"]</text:span></text:p>
                  </text:list-item>
                </text:list>
              </text:list-item>
              <text:list-item>
                <text:p text:style-name="P1"><text:span text:style-name="T1">Repita tudo mas para converter para JPG</text:span></text:p>
              </text:list-item>
              <text:list-item>
                <text:p text:style-name="P1"><text:span text:style-name="T1">Agrupe ficheiros em </text:span><text:span text:style-name="T3">outros</text:span><text:span text:style-name="T1"> com agrupar por no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2 – Renomear em lote</text:p>
          </draw:text-box>
        </draw:frame>
        <draw:frame presentation:style-name="pr2" draw:layer="layout" svg:width="26.6cm" svg:height="12.065cm" svg:x="1.4cm" svg:y="3.685cm" presentation:class="outline" presentation:user-transformed="true">
          <draw:text-box>
            <text:list text:style-name="L2">
              <text:list-item>
                <text:p text:style-name="P1"><text:span text:style-name="T9">Utilize o botão direito to rato para renomear todos os desenhos da pasta Marcos introduzindo o termo DES como prefixo</text:span></text:p>
              </text:list-item>
              <text:list-item>
                <text:p text:style-name="P1"><text:span text:style-name="T9">Repita para introduzir FOT nas fotografia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refa 13 – Remover repetido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Criar/atualizar <text:span text:style-name="T10">fingerprints </text:span><text:span text:style-name="T11">(aba e </text:span><text:span text:style-name="T12">Manutenção</text:span><text:span text:style-name="T11">)</text:span></text:p>
              </text:list-item>
              <text:list-item>
                <text:p text:style-name="P1">Pesquisar Duplicados na pasta <text:span text:style-name="T5">Oficina-sessao2</text:span></text:p>
              </text:list-item>
              <text:list-item>
                <text:p text:style-name="P1">Ou BDR com Descobrir Semelhantes… em Imagem </text:p>
              </text:list-item>
              <text:list-item>
                <text:p text:style-name="P1">Apague as cópias que não se justific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Tarefa 14 – Image Quality Scan = Auto-<text:span text:style-name="T10">cull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ione a pasta Marcos&gt;fotografias</text:p>
              </text:list-item>
              <text:list-item>
                <text:p><text:span text:style-name="T1">Configure: </text:span>All/non-assigned; Aesthetic/Basic; </text:p>
              </text:list-item>
              <text:list-item>
                <text:p>Basic Factors disponível se escolher esse método…</text:p>
              </text:list-item>
              <text:list-item>
                <text:p>Execute e espe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5 – Auto-<text:span text:style-name="T13">ta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ione a pasta Marcos&gt;fotografias</text:p>
              </text:list-item>
              <text:list-item>
                <text:p>Configure: All/non-assigned; Update/Replace; Model</text:p>
              </text:list-item>
              <text:list-item>
                <text:p>Utilize as línguas para experimentar diferentes modelos/accuracy</text:p>
              </text:list-item>
              <text:list-item>
                <text:p>Execute e espe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refa 16 - Reconhecimento facial</text:p>
          </draw:text-box>
        </draw:frame>
        <draw:frame presentation:style-name="pr2" draw:layer="layout" svg:width="26.6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Deteção facial (criar tags) em pasta/tag de referência (</text:span><text:span text:style-name="T10">pessoas&gt;aprender</text:span>)</text:p>
              </text:list-item>
              <text:list-item>
                <text:p>Usar tags, ignorar e remover falsos positivos</text:p>
              </text:list-item>
              <text:list-item>
                <text:p text:style-name="P1"><text:span text:style-name="T1">Reconhecimento facial em pasta/tag (</text:span><text:span text:style-name="T10">pessoas&gt;reconhecer</text:span>)</text:p>
              </text:list-item>
              <text:list-item>
                <text:p>Limpar tudo (Ferramenta de Manutenção)</text:p>
              </text:list-item>
              <text:list-item>
                <text:p><text:span text:style-name="T5">Experimente com outras foto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refa 17 – Image editor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Crie uma pasta dentro do <text:span text:style-name="T5">outros</text:span> e copie 4 imagens (2 JPGs e 2 DNGs) à sua escolha para lá</text:p>
              </text:list-item>
              <text:list-item>
                <text:p>Utilize o Image editor para introduzir alterações</text:p>
              </text:list-item>
              <text:list-item>
                <text:p>SEMPRE: Gravar Como Nova Versão</text:p>
              </text:list-item>
              <text:list-item>
                <text:p>No final, deverá ter os 4 originais e 2 versões paa cada origin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8 – Mesa de luz e versões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Utilize a mesa de luz para comparar pares e ver se tem áreas sub/sobre expostas</text:p>
              </text:list-item>
              <text:list-item>
                <text:p>Utilize o Sincronizar e Pelo Par</text:p>
              </text:list-item>
              <text:list-item>
                <text:p>Veja a informação na aba Versões (barra direita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6">Tarefa 19 – Marca de água no GFL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Escolha uma pasta e utilize o GFL para introduzir um Contorno com 20% e marca de água de texto em várias imagens (mínimo 4). Exporte para uma nova pasta.</text:p>
              </text:list-item>
              <text:list-item>
                <text:p>Utilize a ferramentas Criar uma Galeria HTML com as imagens export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6">Tarefa 20 – Duas ferramentas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Escolha uma imagem para utilizar o Image Mosaic Wall</text:p>
              </text:list-item>
              <text:list-item>
                <text:p>Utilize Criar Apresentação de Video com o álbum de fotografias da pasta Marco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04:08.957479658</meta:creation-date>
    <dc:date>2026-06-25T16:00:42.092350982</dc:date>
    <meta:editing-duration>PT6H25M51S</meta:editing-duration>
    <meta:editing-cycles>42</meta:editing-cycles>
    <meta:generator>LibreOffice/26.2.3.2$Linux_X86_64 LibreOffice_project/d4d5ed47b6084125f28d269a5650105d54dde034</meta:generator>
    <meta:document-statistic meta:object-count="101"/>
  </office:meta>
</office:document-meta>
</file>